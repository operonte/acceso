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text-properties fo:font-size="15pt" fo:font-weight="bold"/>
    </style:style>
    <style:style style:name="P3" style:family="paragraph" style:parent-style-name="Quotations">
      <style:paragraph-properties fo:margin-left="1.423cm" fo:margin-right="1.423cm" fo:margin-top="0.423cm" fo:margin-bottom="0.423cm" style:contextual-spacing="false" fo:text-indent="0cm" style:auto-text-indent="false"/>
    </style:style>
    <style:style style:name="P4" style:family="paragraph" style:parent-style-name="Standard">
      <style:paragraph-properties fo:margin-left="0.423cm" fo:margin-right="0.423cm" fo:margin-top="0.423cm" fo:margin-bottom="0.423cm" style:contextual-spacing="false" fo:text-indent="0cm" style:auto-text-indent="false"/>
    </style:style>
    <style:style style:name="P5" style:family="paragraph" style:parent-style-name="Standard">
      <style:paragraph-properties fo:margin-left="0.423cm" fo:margin-right="0.423cm" fo:margin-top="0.423cm" fo:margin-bottom="0.423cm" style:contextual-spacing="false" fo:text-indent="0cm" style:auto-text-indent="false"/>
      <style:text-properties fo:font-weight="normal"/>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left="0.423cm" fo:margin-right="0.423cm" fo:margin-top="0.423cm" fo:margin-bottom="0.423cm" style:contextual-spacing="false" fo:text-indent="0cm" style:auto-text-indent="false" style:writing-mode="lr-tb"/>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list-style-name="L1">
      <style:paragraph-properties fo:margin-left="0cm" fo:margin-right="0cm" fo:margin-top="0cm" fo:margin-bottom="0cm" style:contextual-spacing="false" fo:text-indent="0cm" style:auto-text-indent="false"/>
    </style:style>
    <style:style style:name="P10" style:family="paragraph" style:parent-style-name="Text_20_body" style:list-style-name="L1">
      <style:paragraph-properties fo:margin-left="0cm" fo:margin-right="0cm" fo:text-indent="0cm" style:auto-text-indent="false" style:writing-mode="lr-tb"/>
    </style:style>
    <style:style style:name="P11" style:family="paragraph" style:parent-style-name="Text_20_body" style:list-style-name="L2">
      <style:paragraph-properties fo:margin-left="0cm" fo:margin-right="0cm" fo:margin-top="0cm" fo:margin-bottom="0cm" style:contextual-spacing="false" fo:text-indent="0cm" style:auto-text-indent="false"/>
    </style:style>
    <style:style style:name="P12" style:family="paragraph" style:parent-style-name="Text_20_body" style:list-style-name="L2">
      <style:paragraph-properties fo:margin-left="0cm" fo:margin-right="0cm" fo:text-indent="0cm" style:auto-text-indent="false" style:writing-mode="lr-tb"/>
    </style:style>
    <style:style style:name="P13" style:family="paragraph" style:parent-style-name="Text_20_body" style:list-style-name="L3">
      <style:paragraph-properties fo:margin-left="0cm" fo:margin-right="0cm" fo:margin-top="0cm" fo:margin-bottom="0cm" style:contextual-spacing="false" fo:text-indent="0cm" style:auto-text-indent="false"/>
    </style:style>
    <style:style style:name="P14" style:family="paragraph" style:parent-style-name="Text_20_body" style:list-style-name="L3">
      <style:paragraph-properties fo:margin-left="0cm" fo:margin-right="0cm" fo:text-indent="0cm" style:auto-text-indent="false"/>
    </style:style>
    <style:style style:name="P15" style:family="paragraph" style:parent-style-name="Text_20_body" style:list-style-name="L4">
      <style:paragraph-properties fo:margin-left="0cm" fo:margin-right="0cm" fo:margin-top="0cm" fo:margin-bottom="0cm" style:contextual-spacing="false" fo:text-indent="0cm" style:auto-text-indent="false"/>
    </style:style>
    <style:style style:name="P16" style:family="paragraph" style:parent-style-name="Text_20_body" style:list-style-name="L4">
      <style:paragraph-properties fo:margin-left="0cm" fo:margin-right="0cm" fo:text-indent="0cm" style:auto-text-indent="false"/>
    </style:style>
    <style:style style:name="P17" style:family="paragraph" style:parent-style-name="Text_20_body" style:list-style-name="L4">
      <style:paragraph-properties fo:margin-left="0cm" fo:margin-right="0cm" fo:margin-top="0cm" fo:margin-bottom="0cm" style:contextual-spacing="false" fo:text-indent="0cm" style:auto-text-indent="false"/>
      <style:text-properties fo:font-weight="bold"/>
    </style:style>
    <style:style style:name="P18" style:family="paragraph" style:parent-style-name="Text_20_body" style:list-style-name="L7">
      <style:paragraph-properties fo:margin-left="0cm" fo:margin-right="0cm" fo:margin-top="0cm" fo:margin-bottom="0cm" style:contextual-spacing="false" fo:text-indent="0cm" style:auto-text-indent="false"/>
      <style:text-properties fo:font-weight="bold"/>
    </style:style>
    <style:style style:name="P19" style:family="paragraph" style:parent-style-name="Text_20_body" style:list-style-name="L13">
      <style:paragraph-properties fo:margin-left="0cm" fo:margin-right="0cm" fo:margin-top="0cm" fo:margin-bottom="0cm" style:contextual-spacing="false" fo:text-indent="0cm" style:auto-text-indent="false"/>
      <style:text-properties fo:font-weight="bold"/>
    </style:style>
    <style:style style:name="P20" style:family="paragraph" style:parent-style-name="Text_20_body" style:list-style-name="L25">
      <style:paragraph-properties fo:margin-left="0cm" fo:margin-right="0cm" fo:margin-top="0cm" fo:margin-bottom="0cm" style:contextual-spacing="false" fo:text-indent="0cm" style:auto-text-indent="false"/>
      <style:text-properties fo:font-weight="bold"/>
    </style:style>
    <style:style style:name="P21" style:family="paragraph" style:parent-style-name="Text_20_body" style:list-style-name="L28">
      <style:paragraph-properties fo:margin-left="0cm" fo:margin-right="0cm" fo:margin-top="0cm" fo:margin-bottom="0cm" style:contextual-spacing="false" fo:text-indent="0cm" style:auto-text-indent="false"/>
      <style:text-properties fo:font-weight="bold"/>
    </style:style>
    <style:style style:name="P22" style:family="paragraph" style:parent-style-name="Text_20_body" style:list-style-name="L29">
      <style:paragraph-properties fo:margin-left="0cm" fo:margin-right="0cm" fo:margin-top="0cm" fo:margin-bottom="0cm" style:contextual-spacing="false" fo:text-indent="0cm" style:auto-text-indent="false"/>
      <style:text-properties fo:font-weight="bold"/>
    </style:style>
    <style:style style:name="P23" style:family="paragraph" style:parent-style-name="Text_20_body" style:list-style-name="L33">
      <style:paragraph-properties fo:margin-left="0cm" fo:margin-right="0cm" fo:margin-top="0cm" fo:margin-bottom="0cm" style:contextual-spacing="false" fo:text-indent="0cm" style:auto-text-indent="false"/>
      <style:text-properties fo:font-weight="bold"/>
    </style:style>
    <style:style style:name="P24" style:family="paragraph" style:parent-style-name="Text_20_body" style:list-style-name="L34">
      <style:paragraph-properties fo:margin-left="0cm" fo:margin-right="0cm" fo:margin-top="0cm" fo:margin-bottom="0cm" style:contextual-spacing="false" fo:text-indent="0cm" style:auto-text-indent="false"/>
      <style:text-properties fo:font-weight="bold"/>
    </style:style>
    <style:style style:name="P25" style:family="paragraph" style:parent-style-name="Text_20_body" style:list-style-name="L36">
      <style:paragraph-properties fo:margin-left="0cm" fo:margin-right="0cm" fo:margin-top="0cm" fo:margin-bottom="0cm" style:contextual-spacing="false" fo:text-indent="0cm" style:auto-text-indent="false"/>
      <style:text-properties fo:font-weight="bold"/>
    </style:style>
    <style:style style:name="P26" style:family="paragraph" style:parent-style-name="Text_20_body" style:list-style-name="L37">
      <style:paragraph-properties fo:margin-left="0cm" fo:margin-right="0cm" fo:margin-top="0cm" fo:margin-bottom="0cm" style:contextual-spacing="false" fo:text-indent="0cm" style:auto-text-indent="false"/>
      <style:text-properties fo:font-weight="bold"/>
    </style:style>
    <style:style style:name="P27" style:family="paragraph" style:parent-style-name="Text_20_body" style:list-style-name="L38">
      <style:paragraph-properties fo:margin-left="0cm" fo:margin-right="0cm" fo:margin-top="0cm" fo:margin-bottom="0cm" style:contextual-spacing="false" fo:text-indent="0cm" style:auto-text-indent="false"/>
      <style:text-properties fo:font-weight="bold"/>
    </style:style>
    <style:style style:name="P28" style:family="paragraph" style:parent-style-name="Text_20_body" style:list-style-name="L5">
      <style:paragraph-properties fo:margin-left="0cm" fo:margin-right="0cm" fo:margin-top="0cm" fo:margin-bottom="0cm" style:contextual-spacing="false" fo:text-indent="0cm" style:auto-text-indent="false"/>
    </style:style>
    <style:style style:name="P29" style:family="paragraph" style:parent-style-name="Text_20_body" style:list-style-name="L5">
      <style:paragraph-properties fo:margin-left="0cm" fo:margin-right="0cm" fo:text-indent="0cm" style:auto-text-indent="false" style:writing-mode="lr-tb"/>
    </style:style>
    <style:style style:name="P30" style:family="paragraph" style:parent-style-name="Text_20_body" style:list-style-name="L6">
      <style:paragraph-properties fo:margin-left="0cm" fo:margin-right="0cm" fo:margin-top="0cm" fo:margin-bottom="0cm" style:contextual-spacing="false" fo:text-indent="0cm" style:auto-text-indent="false"/>
    </style:style>
    <style:style style:name="P31" style:family="paragraph" style:parent-style-name="Text_20_body" style:list-style-name="L6">
      <style:paragraph-properties fo:margin-left="0cm" fo:margin-right="0cm" fo:text-indent="0cm" style:auto-text-indent="false"/>
    </style:style>
    <style:style style:name="P32" style:family="paragraph" style:parent-style-name="Text_20_body" style:list-style-name="L7"/>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7">
      <style:paragraph-properties fo:margin-left="0cm" fo:margin-right="0cm" fo:margin-top="0cm" fo:margin-bottom="0cm" style:contextual-spacing="false" fo:text-indent="0cm" style:auto-text-indent="false"/>
    </style:style>
    <style:style style:name="P35" style:family="paragraph" style:parent-style-name="Text_20_body" style:list-style-name="L8">
      <style:paragraph-properties fo:margin-left="0cm" fo:margin-right="0cm" fo:margin-top="0cm" fo:margin-bottom="0cm" style:contextual-spacing="false" fo:text-indent="0cm" style:auto-text-indent="false"/>
    </style:style>
    <style:style style:name="P36" style:family="paragraph" style:parent-style-name="Text_20_body" style:list-style-name="L8">
      <style:paragraph-properties fo:margin-left="0cm" fo:margin-right="0cm" fo:text-indent="0cm" style:auto-text-indent="false"/>
    </style:style>
    <style:style style:name="P37" style:family="paragraph" style:parent-style-name="Text_20_body" style:list-style-name="L9">
      <style:paragraph-properties fo:margin-left="0cm" fo:margin-right="0cm" fo:margin-top="0cm" fo:margin-bottom="0cm" style:contextual-spacing="false" fo:text-indent="0cm" style:auto-text-indent="false"/>
    </style:style>
    <style:style style:name="P38" style:family="paragraph" style:parent-style-name="Text_20_body" style:list-style-name="L9">
      <style:paragraph-properties fo:margin-left="0cm" fo:margin-right="0cm" fo:text-indent="0cm" style:auto-text-indent="false" style:writing-mode="lr-tb"/>
    </style:style>
    <style:style style:name="P39" style:family="paragraph" style:parent-style-name="Text_20_body" style:list-style-name="L10">
      <style:paragraph-properties fo:margin-left="0cm" fo:margin-right="0cm" fo:margin-top="0cm" fo:margin-bottom="0cm" style:contextual-spacing="false" fo:text-indent="0cm" style:auto-text-indent="false"/>
    </style:style>
    <style:style style:name="P40" style:family="paragraph" style:parent-style-name="Text_20_body" style:list-style-name="L10">
      <style:paragraph-properties fo:margin-left="0cm" fo:margin-right="0cm" fo:text-indent="0cm" style:auto-text-indent="false"/>
    </style:style>
    <style:style style:name="P41" style:family="paragraph" style:parent-style-name="Text_20_body" style:list-style-name="L11">
      <style:paragraph-properties fo:margin-left="0cm" fo:margin-right="0cm" fo:margin-top="0cm" fo:margin-bottom="0cm" style:contextual-spacing="false" fo:text-indent="0cm" style:auto-text-indent="false"/>
    </style:style>
    <style:style style:name="P42" style:family="paragraph" style:parent-style-name="Text_20_body" style:list-style-name="L11">
      <style:paragraph-properties fo:margin-left="0cm" fo:margin-right="0cm" fo:text-indent="0cm" style:auto-text-indent="false"/>
    </style:style>
    <style:style style:name="P43" style:family="paragraph" style:parent-style-name="Text_20_body" style:list-style-name="L12">
      <style:paragraph-properties fo:margin-left="0cm" fo:margin-right="0cm" fo:margin-top="0cm" fo:margin-bottom="0cm" style:contextual-spacing="false" fo:text-indent="0cm" style:auto-text-indent="false"/>
    </style:style>
    <style:style style:name="P44" style:family="paragraph" style:parent-style-name="Text_20_body" style:list-style-name="L12">
      <style:paragraph-properties fo:margin-left="0cm" fo:margin-right="0cm" fo:text-indent="0cm" style:auto-text-indent="false"/>
    </style:style>
    <style:style style:name="P45" style:family="paragraph" style:parent-style-name="Text_20_body" style:list-style-name="L13">
      <style:paragraph-properties fo:margin-left="0cm" fo:margin-right="0cm" fo:margin-top="0cm" fo:margin-bottom="0cm" style:contextual-spacing="false" fo:text-indent="0cm" style:auto-text-indent="false"/>
    </style:style>
    <style:style style:name="P46" style:family="paragraph" style:parent-style-name="Text_20_body" style:list-style-name="L13">
      <style:paragraph-properties fo:margin-left="0cm" fo:margin-right="0cm" fo:text-indent="0cm" style:auto-text-indent="false"/>
    </style:style>
    <style:style style:name="P47" style:family="paragraph" style:parent-style-name="Text_20_body" style:list-style-name="L14">
      <style:paragraph-properties fo:margin-left="0cm" fo:margin-right="0cm" fo:margin-top="0cm" fo:margin-bottom="0cm" style:contextual-spacing="false" fo:text-indent="0cm" style:auto-text-indent="false"/>
    </style:style>
    <style:style style:name="P48" style:family="paragraph" style:parent-style-name="Text_20_body" style:list-style-name="L14">
      <style:paragraph-properties fo:margin-left="0cm" fo:margin-right="0cm" fo:text-indent="0cm" style:auto-text-indent="false"/>
    </style:style>
    <style:style style:name="P49" style:family="paragraph" style:parent-style-name="Text_20_body" style:list-style-name="L15">
      <style:paragraph-properties fo:margin-left="0cm" fo:margin-right="0cm" fo:margin-top="0cm" fo:margin-bottom="0cm" style:contextual-spacing="false" fo:text-indent="0cm" style:auto-text-indent="false"/>
    </style:style>
    <style:style style:name="P50" style:family="paragraph" style:parent-style-name="Text_20_body" style:list-style-name="L15">
      <style:paragraph-properties fo:margin-left="0cm" fo:margin-right="0cm" fo:text-indent="0cm" style:auto-text-indent="false"/>
    </style:style>
    <style:style style:name="P51" style:family="paragraph" style:parent-style-name="Text_20_body" style:list-style-name="L16">
      <style:paragraph-properties fo:margin-left="0cm" fo:margin-right="0cm" fo:margin-top="0cm" fo:margin-bottom="0cm" style:contextual-spacing="false" fo:text-indent="0cm" style:auto-text-indent="false"/>
    </style:style>
    <style:style style:name="P52" style:family="paragraph" style:parent-style-name="Text_20_body" style:list-style-name="L16">
      <style:paragraph-properties fo:margin-left="0cm" fo:margin-right="0cm" fo:text-indent="0cm" style:auto-text-indent="false"/>
    </style:style>
    <style:style style:name="P53" style:family="paragraph" style:parent-style-name="Text_20_body">
      <style:paragraph-properties fo:margin-left="0.423cm" fo:margin-right="0.423cm" fo:margin-top="0.423cm" fo:margin-bottom="0.423cm" style:contextual-spacing="false" fo:text-indent="0cm" style:auto-text-indent="false"/>
      <style:text-properties fo:font-weight="normal"/>
    </style:style>
    <style:style style:name="P54" style:family="paragraph" style:parent-style-name="Text_20_body" style:list-style-name="L25">
      <style:paragraph-properties fo:margin-left="0cm" fo:margin-right="0cm" fo:margin-top="0cm" fo:margin-bottom="0cm" style:contextual-spacing="false" fo:text-indent="0cm" style:auto-text-indent="false"/>
    </style:style>
    <style:style style:name="P55" style:family="paragraph" style:parent-style-name="Text_20_body" style:list-style-name="L25">
      <style:paragraph-properties fo:margin-left="0cm" fo:margin-right="0cm" fo:text-indent="0cm" style:auto-text-indent="false"/>
    </style:style>
    <style:style style:name="P56" style:family="paragraph" style:parent-style-name="Text_20_body" style:list-style-name="L26">
      <style:paragraph-properties fo:margin-left="0cm" fo:margin-right="0cm" fo:margin-top="0cm" fo:margin-bottom="0cm" style:contextual-spacing="false" fo:text-indent="0cm" style:auto-text-indent="false"/>
    </style:style>
    <style:style style:name="P57" style:family="paragraph" style:parent-style-name="Text_20_body" style:list-style-name="L26">
      <style:paragraph-properties fo:margin-left="0cm" fo:margin-right="0cm" fo:text-indent="0cm" style:auto-text-indent="false"/>
    </style:style>
    <style:style style:name="P58" style:family="paragraph" style:parent-style-name="Text_20_body" style:list-style-name="L27">
      <style:paragraph-properties fo:margin-left="0cm" fo:margin-right="0cm" fo:margin-top="0cm" fo:margin-bottom="0cm" style:contextual-spacing="false" fo:text-indent="0cm" style:auto-text-indent="false"/>
    </style:style>
    <style:style style:name="P59" style:family="paragraph" style:parent-style-name="Text_20_body" style:list-style-name="L27">
      <style:paragraph-properties fo:margin-left="0cm" fo:margin-right="0cm" fo:text-indent="0cm" style:auto-text-indent="false"/>
    </style:style>
    <style:style style:name="P60" style:family="paragraph" style:parent-style-name="Text_20_body" style:list-style-name="L28"/>
    <style:style style:name="P61" style:family="paragraph" style:parent-style-name="Text_20_body" style:list-style-name="L28">
      <style:paragraph-properties fo:margin-top="0cm" fo:margin-bottom="0cm" style:contextual-spacing="false"/>
    </style:style>
    <style:style style:name="P62" style:family="paragraph" style:parent-style-name="Text_20_body" style:list-style-name="L28">
      <style:paragraph-properties fo:margin-left="0cm" fo:margin-right="0cm" fo:margin-top="0cm" fo:margin-bottom="0cm" style:contextual-spacing="false" fo:text-indent="0cm" style:auto-text-indent="false"/>
    </style:style>
    <style:style style:name="P63" style:family="paragraph" style:parent-style-name="Text_20_body" style:list-style-name="L28">
      <style:paragraph-properties fo:margin-left="0cm" fo:margin-right="0cm" fo:margin-top="0cm" fo:margin-bottom="0cm" style:contextual-spacing="false" fo:text-indent="0cm" style:auto-text-indent="false" style:writing-mode="lr-tb"/>
    </style:style>
    <style:style style:name="P64" style:family="paragraph" style:parent-style-name="Text_20_body" style:list-style-name="L29">
      <style:paragraph-properties fo:margin-left="0cm" fo:margin-right="0cm" fo:margin-top="0cm" fo:margin-bottom="0cm" style:contextual-spacing="false" fo:text-indent="0cm" style:auto-text-indent="false"/>
    </style:style>
    <style:style style:name="P65" style:family="paragraph" style:parent-style-name="Text_20_body" style:list-style-name="L29">
      <style:paragraph-properties fo:margin-left="0cm" fo:margin-right="0cm" fo:text-indent="0cm" style:auto-text-indent="false" style:writing-mode="lr-tb"/>
    </style:style>
    <style:style style:name="P66" style:family="paragraph" style:parent-style-name="Text_20_body" style:list-style-name="L30">
      <style:paragraph-properties fo:margin-left="0cm" fo:margin-right="0cm" fo:margin-top="0cm" fo:margin-bottom="0cm" style:contextual-spacing="false" fo:text-indent="0cm" style:auto-text-indent="false"/>
    </style:style>
    <style:style style:name="P67" style:family="paragraph" style:parent-style-name="Text_20_body" style:list-style-name="L30">
      <style:paragraph-properties fo:margin-left="0cm" fo:margin-right="0cm" fo:text-indent="0cm" style:auto-text-indent="false"/>
    </style:style>
    <style:style style:name="P68" style:family="paragraph" style:parent-style-name="Text_20_body" style:list-style-name="L31">
      <style:paragraph-properties fo:margin-left="0cm" fo:margin-right="0cm" fo:margin-top="0cm" fo:margin-bottom="0cm" style:contextual-spacing="false" fo:text-indent="0cm" style:auto-text-indent="false"/>
    </style:style>
    <style:style style:name="P69" style:family="paragraph" style:parent-style-name="Text_20_body" style:list-style-name="L31">
      <style:paragraph-properties fo:margin-left="0cm" fo:margin-right="0cm" fo:text-indent="0cm" style:auto-text-indent="false"/>
    </style:style>
    <style:style style:name="P70" style:family="paragraph" style:parent-style-name="Text_20_body" style:list-style-name="L32">
      <style:paragraph-properties fo:margin-left="0cm" fo:margin-right="0cm" fo:margin-top="0cm" fo:margin-bottom="0cm" style:contextual-spacing="false" fo:text-indent="0cm" style:auto-text-indent="false"/>
    </style:style>
    <style:style style:name="P71" style:family="paragraph" style:parent-style-name="Text_20_body" style:list-style-name="L32">
      <style:paragraph-properties fo:margin-left="0cm" fo:margin-right="0cm" fo:text-indent="0cm" style:auto-text-indent="false"/>
    </style:style>
    <style:style style:name="P72" style:family="paragraph" style:parent-style-name="Text_20_body" style:list-style-name="L33">
      <style:paragraph-properties fo:margin-left="0cm" fo:margin-right="0cm" fo:margin-top="0cm" fo:margin-bottom="0cm" style:contextual-spacing="false" fo:text-indent="0cm" style:auto-text-indent="false"/>
    </style:style>
    <style:style style:name="P73" style:family="paragraph" style:parent-style-name="Text_20_body" style:list-style-name="L33">
      <style:paragraph-properties fo:margin-left="0cm" fo:margin-right="0cm" fo:text-indent="0cm" style:auto-text-indent="false"/>
    </style:style>
    <style:style style:name="P74" style:family="paragraph" style:parent-style-name="Text_20_body" style:list-style-name="L34">
      <style:paragraph-properties fo:margin-left="0cm" fo:margin-right="0cm" fo:margin-top="0cm" fo:margin-bottom="0cm" style:contextual-spacing="false" fo:text-indent="0cm" style:auto-text-indent="false"/>
    </style:style>
    <style:style style:name="P75" style:family="paragraph" style:parent-style-name="Text_20_body" style:list-style-name="L34">
      <style:paragraph-properties fo:margin-left="0cm" fo:margin-right="0cm" fo:text-indent="0cm" style:auto-text-indent="false" style:writing-mode="lr-tb"/>
    </style:style>
    <style:style style:name="P76" style:family="paragraph" style:parent-style-name="Text_20_body" style:list-style-name="L35">
      <style:paragraph-properties fo:margin-left="0cm" fo:margin-right="0cm" fo:margin-top="0cm" fo:margin-bottom="0cm" style:contextual-spacing="false" fo:text-indent="0cm" style:auto-text-indent="false"/>
    </style:style>
    <style:style style:name="P77" style:family="paragraph" style:parent-style-name="Text_20_body" style:list-style-name="L35">
      <style:paragraph-properties fo:margin-left="0cm" fo:margin-right="0cm" fo:text-indent="0cm" style:auto-text-indent="false"/>
    </style:style>
    <style:style style:name="P78" style:family="paragraph" style:parent-style-name="Text_20_body" style:list-style-name="L36">
      <style:paragraph-properties fo:margin-left="0cm" fo:margin-right="0cm" fo:margin-top="0cm" fo:margin-bottom="0cm" style:contextual-spacing="false" fo:text-indent="0cm" style:auto-text-indent="false"/>
    </style:style>
    <style:style style:name="P79" style:family="paragraph" style:parent-style-name="Text_20_body" style:list-style-name="L36">
      <style:paragraph-properties fo:margin-left="0cm" fo:margin-right="0cm" fo:text-indent="0cm" style:auto-text-indent="false"/>
    </style:style>
    <style:style style:name="P80" style:family="paragraph" style:parent-style-name="Text_20_body" style:list-style-name="L37">
      <style:paragraph-properties fo:margin-left="0cm" fo:margin-right="0cm" fo:margin-top="0cm" fo:margin-bottom="0cm" style:contextual-spacing="false" fo:text-indent="0cm" style:auto-text-indent="false"/>
    </style:style>
    <style:style style:name="P81" style:family="paragraph" style:parent-style-name="Text_20_body" style:list-style-name="L37">
      <style:paragraph-properties fo:margin-left="0cm" fo:margin-right="0cm" fo:text-indent="0cm" style:auto-text-indent="false"/>
    </style:style>
    <style:style style:name="P82" style:family="paragraph" style:parent-style-name="Text_20_body" style:list-style-name="L38">
      <style:paragraph-properties fo:margin-top="0cm" fo:margin-bottom="0cm" style:contextual-spacing="false"/>
    </style:style>
    <style:style style:name="P83" style:family="paragraph" style:parent-style-name="Text_20_body" style:list-style-name="L38">
      <style:paragraph-properties fo:margin-left="0cm" fo:margin-right="0cm" fo:margin-top="0cm" fo:margin-bottom="0cm" style:contextual-spacing="false" fo:text-indent="0cm" style:auto-text-indent="false"/>
    </style:style>
    <style:style style:name="P84" style:family="paragraph" style:parent-style-name="Text_20_body" style:list-style-name="L38">
      <style:paragraph-properties fo:margin-left="0cm" fo:margin-right="0cm" fo:text-indent="0cm" style:auto-text-indent="false"/>
    </style:style>
    <style:style style:name="P85" style:family="paragraph" style:parent-style-name="Text_20_body" style:list-style-name="L39">
      <style:paragraph-properties fo:margin-left="0cm" fo:margin-right="0cm" fo:margin-top="0cm" fo:margin-bottom="0cm" style:contextual-spacing="false" fo:text-indent="0cm" style:auto-text-indent="false"/>
    </style:style>
    <style:style style:name="P86" style:family="paragraph" style:parent-style-name="Text_20_body" style:list-style-name="L39">
      <style:paragraph-properties fo:margin-left="0cm" fo:margin-right="0cm" fo:text-indent="0cm" style:auto-text-indent="false" style:writing-mode="lr-tb"/>
    </style:style>
    <style:style style:name="P87" style:family="paragraph" style:parent-style-name="Text_20_body" style:list-style-name="L40">
      <style:paragraph-properties fo:margin-left="0cm" fo:margin-right="0cm" fo:margin-top="0cm" fo:margin-bottom="0cm" style:contextual-spacing="false" fo:text-indent="0cm" style:auto-text-indent="false"/>
    </style:style>
    <style:style style:name="P88" style:family="paragraph" style:parent-style-name="Text_20_body" style:list-style-name="L40">
      <style:paragraph-properties fo:margin-left="0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normal"/>
    </style:style>
    <style:style style:name="T4" style:family="text">
      <style:text-properties fo:font-style="italic" fo:font-weight="bold"/>
    </style:style>
    <style:style style:name="T5" style:family="text">
      <style:text-properties fo:font-weight="normal"/>
    </style:style>
    <style:style style:name="T6" style:family="text">
      <style:text-properties fo:font-weight="normal" fo:background-color="#f4f6f7" loext:char-shading-value="0" loext:padding-left="0.106cm" loext:padding-right="0cm" loext:padding-top="0.053cm" loext:padding-bottom="0.053cm" loext:border-left="0.06pt solid #f4f6f7" loext:border-right="none" loext:border-top="0.06pt solid #f4f6f7" loext:border-bottom="0.06pt solid #f4f6f7"/>
    </style:style>
    <style:style style:name="T7" style:family="text">
      <style:text-properties fo:font-size="15pt" fo:font-weight="bold"/>
    </style:style>
    <style:style style:name="T8" style:family="text">
      <style:text-properties fo:font-size="15pt" fo:font-style="italic" fo:font-weight="bold"/>
    </style:style>
    <style:style style:name="T9" style:family="text">
      <style:text-properties fo:font-size="15pt" fo:font-style="italic" fo:font-weight="normal"/>
    </style:style>
    <style:style style:name="T10" style:family="text">
      <style:text-properties fo:font-size="15pt" fo:font-weight="normal"/>
    </style:style>
    <style:style style:name="T11" style:family="text">
      <style:text-properties fo:background-color="#f4f6f7" loext:char-shading-value="0" loext:padding-left="0.106cm" loext:padding-right="0cm" loext:padding-top="0.053cm" loext:padding-bottom="0.053cm" loext:border-left="0.06pt solid #f4f6f7" loext:border-right="none" loext:border-top="0.06pt solid #f4f6f7" loext:border-bottom="0.06pt solid #f4f6f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span text:style-name="T7">GUÍA MAESTRA: REQUISITOS TÉCNICOS PARA APLICACIONES PROFESIONALES Y VENDIBLES</text:span></text:h>
      <text:p text:style-name="P7"><text:span text:style-name="T5">Este documento técnico detalla la infraestructura invisible que separa un "juguete o demo de fin de semana" en </text:span><text:span text:style-name="Source_20_Text"><text:span text:style-name="T6">localhost:3000</text:span></text:span><text:span text:style-name="T5"> de un Producto Mínimo Viable (MVP) comercial, escalable, seguro y listo para recibir pagos de clientes reales.</text:span></text:p>
      <text:p text:style-name="Horizontal_20_Line"/>
      <text:h text:style-name="P1" text:outline-level="2">🛡️ <text:span text:style-name="T7">SECCIÓN 1: Seguridad, Privacidad y Protección de Datos</text:span></text:h>
      <text:h text:style-name="P1" text:outline-level="2"><text:span text:style-name="T7">1. Front-End Comprimido y Ocultación de Código (</text:span><text:span text:style-name="Emphasis"><text:span text:style-name="T8">Production Build &amp; Source Maps</text:span></text:span><text:span text:style-name="T7">)</text:span></text:h>
      <text:list text:style-name="L1">
        <text:list-item>
          <text:p text:style-name="P9"><text:span text:style-name="T1">Definición:</text:span> Proceso de compilación donde el código JavaScript se unifica, minimiza y comprime para producción.</text:p>
        </text:list-item>
        <text:list-item>
          <text:p text:style-name="P10"><text:span text:style-name="T1">Acción Técnica:</text:span> Configurar el framework (Next.js, Vite, Nuxt) para <text:span text:style-name="T1">desactivar los Source Maps</text:span> (<text:span text:style-name="Source_20_Text"><text:span text:style-name="T11">productionSourceMaps: false</text:span></text:span>). Si se dejan activos, cualquier usuario puede abrir la consola del navegador, inspeccionar tu código fuente original y robar la lógica del negocio o las llaves de API expuestas por error.</text:p>
        </text:list-item>
      </text:list>
      <text:h text:style-name="P1" text:outline-level="2"><text:span text:style-name="T7">2. Seguridad a Nivel de Fila en Base de Datos (</text:span><text:span text:style-name="Emphasis"><text:span text:style-name="T8">Row Level Security - RLS</text:span></text:span><text:span text:style-name="T7">)</text:span></text:h>
      <text:list text:style-name="L2">
        <text:list-item>
          <text:p text:style-name="P11"><text:span text:style-name="T1">Definición:</text:span> Mecanismo de control de acceso en la base de datos (común en PostgreSQL o Supabase) que valida la identidad del usuario en cada consulta.</text:p>
        </text:list-item>
        <text:list-item>
          <text:p text:style-name="P12"><text:span text:style-name="T1">Acción Técnica:</text:span> Activar RLS en todas las tablas. Crear políticas estrictas donde el sistema verifique que el <text:span text:style-name="Source_20_Text"><text:span text:style-name="T11">user_id</text:span></text:span> de la fila coincida exactamente con el token de autenticación (<text:span text:style-name="Source_20_Text"><text:span text:style-name="T11">auth.uid()</text:span></text:span>) del usuario que hace la petición. Esto evita que un usuario altere parámetros en la URL o API para leer o modificar datos de otros clientes.</text:p>
        </text:list-item>
      </text:list>
      <text:h text:style-name="P2" text:outline-level="2">3. Cifrado de Extremo a Extremo para Datos Sensibles</text:h>
      <text:list text:style-name="L3">
        <text:list-item>
          <text:p text:style-name="P13"><text:span text:style-name="T1">Definición:</text:span> Encriptación de datos críticos antes de ser almacenados en la base de datos física.</text:p>
        </text:list-item>
        <text:list-item>
          <text:p text:style-name="P14"><text:span text:style-name="T1">Acción Técnica:</text:span> Datos de alta privacidad (como historiales médicos, balances financieros o contraseñas externas) deben encriptarse en el backend usando algoritmos robustos (como <text:span text:style-name="T1">AES-256</text:span>). Ni tú como administrador ni un atacante que vulnere la base de datos debe poder leer esta información en texto plano.</text:p>
        </text:list-item>
      </text:list>
      <text:h text:style-name="P2" text:outline-level="2">4. Marco Legal Obligatorio y Privacidad de Datos</text:h>
      <text:list text:style-name="L4">
        <text:list-item>
          <text:p text:style-name="P15"><text:span text:style-name="T1">Definición:</text:span> Cumplimiento de las normativas legales de protección de datos vigentes (como la Ley de Protección de Datos Personales en Chile [Ley 21.719] o GDPR en Europa).</text:p>
        </text:list-item>
        <text:list-item>
          <text:p text:style-name="P17">Acción Técnica:</text:p>
          <text:list>
            <text:list-item>
              <text:p text:style-name="P15"><text:soft-page-break/>Publicar una página visible con los <text:span text:style-name="T1">Términos de Servicio</text:span> y las <text:span text:style-name="T1">Políticas de Privacidad</text:span> redactadas explícitamente.</text:p>
            </text:list-item>
            <text:list-item>
              <text:p text:style-name="P16">Implementar obligatoriamente un botón de <text:span text:style-name="T1">"Eliminar mi cuenta"</text:span> dentro del perfil del usuario que borre de forma definitiva y en cascada todos sus registros de la base de datos.</text:p>
            </text:list-item>
          </text:list>
        </text:list-item>
      </text:list>
      <text:p text:style-name="Horizontal_20_Line"/>
      <text:h text:style-name="P1" text:outline-level="2">⚡ <text:span text:style-name="T7">SECCIÓN 2: Control de Versiones, API y Despliegue (</text:span><text:span text:style-name="Emphasis"><text:span text:style-name="T8">Deployment</text:span></text:span><text:span text:style-name="T7">)</text:span></text:h>
      <text:h text:style-name="P1" text:outline-level="2"><text:span text:style-name="T7">5. Control de Versiones Estricto (</text:span><text:span text:style-name="Emphasis"><text:span text:style-name="T8">Git &amp; GitHub Workflow</text:span></text:span><text:span text:style-name="T7">)</text:span></text:h>
      <text:list text:style-name="L5">
        <text:list-item>
          <text:p text:style-name="P28"><text:span text:style-name="T1">Definición:</text:span> Sistema de seguimiento de cambios en el código para evitar sobreescrituras y pérdida de progreso.</text:p>
        </text:list-item>
        <text:list-item>
          <text:p text:style-name="P29"><text:span text:style-name="T1">Acción Técnica:</text:span> Prohibido programar directamente sobre la rama principal (<text:span text:style-name="Source_20_Text"><text:span text:style-name="T11">main</text:span></text:span> o <text:span text:style-name="Source_20_Text"><text:span text:style-name="T11">master</text:span></text:span>). Crear ramas secundarias (<text:span text:style-name="Source_20_Text"><text:span text:style-name="T11">feature/nueva-funcion</text:span></text:span>) para trabajar con la Inteligencia Artificial. Usar repositorios privados en GitHub o GitLab y realizar integraciones mediante solicitudes de fusión (<text:span text:style-name="Emphasis"><text:span text:style-name="T2">Pull Requests</text:span></text:span>) revisadas.</text:p>
        </text:list-item>
      </text:list>
      <text:h text:style-name="P1" text:outline-level="2"><text:span text:style-name="T7">6. Arquitectura de APIs Limpia (</text:span><text:span text:style-name="Emphasis"><text:span text:style-name="T8">Backend Separado</text:span></text:span><text:span text:style-name="T7">)</text:span></text:h>
      <text:list text:style-name="L6">
        <text:list-item>
          <text:p text:style-name="P30"><text:span text:style-name="T1">Definición:</text:span> Desacoplamiento total entre la interfaz visual (Front-end) y el cerebro lógico de la aplicación (Back-end).</text:p>
        </text:list-item>
        <text:list-item>
          <text:p text:style-name="P31"><text:span text:style-name="T1">Acción Técnica:</text:span> Construir un backend estructurado (utilizando FastAPI, Node.js/Express o similares) que actúe como una API REST o GraphQL. El front-end solo debe dedicarse a pintar la pantalla; toda la lógica pesada, consultas a la IA y conexiones a pasarelas de pago se ejecutan de forma segura en el servidor backend.</text:p>
        </text:list-item>
      </text:list>
      <text:h text:style-name="P1" text:outline-level="2"><text:span text:style-name="T7">7. Hosting y Entornos de Despliegue Automatizados (</text:span><text:span text:style-name="Emphasis"><text:span text:style-name="T8">CI/CD</text:span></text:span><text:span text:style-name="T7">)</text:span></text:h>
      <text:list text:style-name="L7">
        <text:list-item>
          <text:p text:style-name="P34"><text:span text:style-name="T1">Definición:</text:span> Servidores profesionales en la nube que reemplazan el entorno local del computador del desarrollador.</text:p>
        </text:list-item>
        <text:list-item>
          <text:p text:style-name="P18">Acción Técnica:</text:p>
          <text:list>
            <text:list-item>
              <text:p text:style-name="P33">Desplegar el front-end en plataformas optimizadas (como Vercel o Netlify) y el backend en servicios en la nube (como Railway, Render o AWS).</text:p>
            </text:list-item>
            <text:list-item>
              <text:p text:style-name="P32">Configurar pipelines de integración y despliegue continuo (CI/CD): cada vez que subas código limpio a GitHub, la aplicación en vivo se actualizará sola sin interrumpir a los usuarios.</text:p>
            </text:list-item>
          </text:list>
        </text:list-item>
      </text:list>
      <text:h text:style-name="P1" text:outline-level="2"><text:span text:style-name="T7">8. Gestión de Entornos Separados (</text:span><text:span text:style-name="Emphasis"><text:span text:style-name="T8">Staging vs. Production</text:span></text:span><text:span text:style-name="T7">)</text:span></text:h>
      <text:list text:style-name="L8">
        <text:list-item>
          <text:p text:style-name="P35"><text:span text:style-name="T1">Definición:</text:span> Duplicación de la infraestructura para pruebas antes de lanzar actualizaciones al público general.</text:p>
        </text:list-item>
        <text:list-item>
          <text:p text:style-name="P36"><text:span text:style-name="T1">Acción Técnica:</text:span> Mantener dos entornos con variables independientes: <text:span text:style-name="T1">Staging</text:span> (servidor de pruebas privado) y <text:span text:style-name="T1">Production</text:span> (servidor en vivo que usan los clientes). Las funciones sugeridas por Claude se despliegan y testean exhaustivamente en Staging; solo cuando están libres de fallas se suben a Production.</text:p>
        </text:list-item>
      </text:list>
      <text:p text:style-name="Horizontal_20_Line"><text:soft-page-break/></text:p>
      <text:h text:style-name="P1" text:outline-level="2">📉 <text:span text:style-name="T7">SECCIÓN 3: Control de Costos, Optimización y Escalabilidad</text:span></text:h>
      <text:h text:style-name="P1" text:outline-level="2"><text:span text:style-name="T7">9. Límite de Peticiones (</text:span><text:span text:style-name="Emphasis"><text:span text:style-name="T8">Rate Limiting - El salvavidas financiero</text:span></text:span><text:span text:style-name="T7">)</text:span></text:h>
      <text:list text:style-name="L9">
        <text:list-item>
          <text:p text:style-name="P37"><text:span text:style-name="T1">Definición:</text:span> Restricción del número de solicitudes que un usuario o dirección IP puede realizar a la aplicación en un periodo de tiempo.</text:p>
        </text:list-item>
        <text:list-item>
          <text:p text:style-name="P38"><text:span text:style-name="T1">Acción Técnica:</text:span> Implementar middlewares de rate limiting (como <text:span text:style-name="Source_20_Text"><text:span text:style-name="T11">express-rate-limit</text:span></text:span> en Node o limitadores en FastAPI) y conectarlos a Redis. Configurar un límite estricto (por ejemplo: máximo 5 llamadas de Inteligencia Artificial por minuto por usuario). <text:span text:style-name="T1">Sin esto, un bot malicioso puede saturar tu servidor y vaciar los fondos de tu tarjeta de crédito con APIs de OpenAI o Anthropic en cuestión de horas.</text:span></text:p>
        </text:list-item>
      </text:list>
      <text:h text:style-name="P1" text:outline-level="2"><text:span text:style-name="T7">10. Memoria Caché de Alta Velocidad (</text:span><text:span text:style-name="Emphasis"><text:span text:style-name="T8">Caching con Redis</text:span></text:span><text:span text:style-name="T7">)</text:span></text:h>
      <text:list text:style-name="L10">
        <text:list-item>
          <text:p text:style-name="P39"><text:span text:style-name="T1">Definición:</text:span> Almacenamiento temporal de datos consultados frecuentemente para evitar procesamientos repetitivos y costosos.</text:p>
        </text:list-item>
        <text:list-item>
          <text:p text:style-name="P40"><text:span text:style-name="T1">Acción Técnica:</text:span> Levantar una instancia de Redis. Si múltiples usuarios realizan la misma consulta pesada (ej: buscar el precio del mismo producto en un e-commerce o una consulta genérica de IA), el backend lee el resultado guardado en la caché en milisegundos en lugar de consumir tokens de API de IA o volver a ejecutar un scraper completo. Reducirá tus costos operativos hasta en un 80%.</text:p>
        </text:list-item>
      </text:list>
      <text:h text:style-name="P2" text:outline-level="2">11. Escalabilidad Automática e Infraestructura Resiliente</text:h>
      <text:list text:style-name="L11">
        <text:list-item>
          <text:p text:style-name="P41"><text:span text:style-name="T1">Definición:</text:span> Capacidad del sistema para adaptarse al aumento repentino de tráfico sin colapsar.</text:p>
        </text:list-item>
        <text:list-item>
          <text:p text:style-name="P42"><text:span text:style-name="T1">Acción Técnica:</text:span> Utilizar bases de datos indexadas correctamente para consultas veloces y diseñar el backend bajo arquitecturas escalables o arquitecturas Serverless. Si tu app pasa de 10 usuarios a 1,000 concurrentes, los servidores deben auto-expandirse para absorber la carga y evitar pantallas en blanco de error del servidor (<text:span text:style-name="Emphasis"><text:span text:style-name="T2">Server Error 500</text:span></text:span>).</text:p>
        </text:list-item>
      </text:list>
      <text:p text:style-name="Horizontal_20_Line"/>
      <text:h text:style-name="P1" text:outline-level="2">⚙️ <text:span text:style-name="T7">SECCIÓN 4: Negocio, Facturación y Resiliencia con Inteligencia Artificial</text:span></text:h>
      <text:h text:style-name="P1" text:outline-level="2"><text:span text:style-name="T7">12. Ciclo de Cobro Automatizado y Gestión de Suscripciones (</text:span><text:span text:style-name="Emphasis"><text:span text:style-name="T8">SaaS Billing</text:span></text:span><text:span text:style-name="T7">)</text:span></text:h>
      <text:list text:style-name="L12">
        <text:list-item>
          <text:p text:style-name="P43"><text:span text:style-name="T1">Definición:</text:span> Motor de pagos que gestiona las membresías o cobros recurrentes de los clientes de forma autónoma.</text:p>
        </text:list-item>
        <text:list-item>
          <text:p text:style-name="P44"><text:span text:style-name="T1">Acción Técnica:</text:span> Integrar plataformas de pago profesionales con SDKs nativos (Stripe, Paddle o pasarelas locales como Mercado Pago/Kushki). El backend debe auditar mediante Webhooks el estado del pago: si la tarjeta del usuario rebota, el sistema debe pausar sus accesos automáticamente y gatillar correos electrónicos automáticos de reintento de cobro.</text:p>
        </text:list-item>
      </text:list>
      <text:h text:style-name="P1" text:outline-level="2"><text:soft-page-break/><text:span text:style-name="T7">13. Resiliencia de APIs de Inteligencia Artificial (</text:span><text:span text:style-name="Emphasis"><text:span text:style-name="T8">Manejo Tolerante a Fallas</text:span></text:span><text:span text:style-name="T7">)</text:span></text:h>
      <text:list text:style-name="L13">
        <text:list-item>
          <text:p text:style-name="P45"><text:span text:style-name="T1">Definición:</text:span> Mecanismos de defensa en el código para mitigar las caídas, lentitud o saturaciones globales de los proveedores de IA.</text:p>
        </text:list-item>
        <text:list-item>
          <text:p text:style-name="P19">Acción Técnica:</text:p>
          <text:list>
            <text:list-item>
              <text:p text:style-name="P45"><text:span text:style-name="T1">Timeouts e Interfaces Activas:</text:span> Si la API de Claude tarda más de lo normal, el front-end no debe congelarse; debe mostrar pantallas de carga interactivas y manejar alertas controladas.</text:p>
            </text:list-item>
            <text:list-item>
              <text:p text:style-name="P46"><text:span text:style-name="T1">Reintentos Exponenciales (</text:span><text:span text:style-name="Emphasis"><text:span text:style-name="T4">Exponential Backoff</text:span></text:span><text:span text:style-name="T1">):</text:span> Programar el backend para que, si una llamada a la IA falla debido a un error de servidor del proveedor, reintente la conexión automáticamente 2 segundos después, luego 4 segundos después, de forma silenciosa antes de mostrar un error definitivo al usuario.</text:p>
            </text:list-item>
          </text:list>
        </text:list-item>
      </text:list>
      <text:h text:style-name="P2" text:outline-level="2">14. Cumplimiento de Licencias de Terceros y Código Abierto</text:h>
      <text:list text:style-name="L14">
        <text:list-item>
          <text:p text:style-name="P47"><text:span text:style-name="T1">Definición:</text:span> Auditoría legal de las herramientas, librerías, iconos y componentes visuales añadidos al proyecto.</text:p>
        </text:list-item>
        <text:list-item>
          <text:p text:style-name="P48"><text:span text:style-name="T1">Acción Técnica:</text:span> Asegurar que todo paquete instalado mediante gestores de dependencia (NPM, Pip) posea licencias comerciales amigables (como <text:span text:style-name="T1">MIT, Apache 2.0 o BSD</text:span>). Evitar el uso descuidado de componentes bajo licencias restrictivas (como GPL estrictas) que puedan obligarte legalmente a liberar el código fuente comercial de tu aplicación de forma gratuita a la comunidad.</text:p>
        </text:list-item>
      </text:list>
      <text:p text:style-name="Horizontal_20_Line"/>
      <text:h text:style-name="P1" text:outline-level="2">👁️ <text:span text:style-name="T7">SECCIÓN 5: Monitoreo, Soporte y Feedback en Vivo</text:span></text:h>
      <text:h text:style-name="P1" text:outline-level="2"><text:span text:style-name="T7">15. Monitoreo Activo de Errores en Tiempo Real (</text:span><text:span text:style-name="Emphasis"><text:span text:style-name="T8">Error Tracking</text:span></text:span><text:span text:style-name="T7">)</text:span></text:h>
      <text:list text:style-name="L15">
        <text:list-item>
          <text:p text:style-name="P49"><text:span text:style-name="T1">Definición:</text:span> Software que captura e informa al desarrollador sobre las fallas internas que experimentan los clientes en vivo.</text:p>
        </text:list-item>
        <text:list-item>
          <text:p text:style-name="P50"><text:span text:style-name="T1">Acción Técnica:</text:span> Integrar herramientas como <text:span text:style-name="T1">Sentry, LogRocket o Datadog</text:span> en el front-end y backend. Cuando la aplicación arroje un error en el celular de un cliente, la herramienta capturará la línea exacta de código rota y las variables del sistema, enviándote una alerta técnica inmediata por correo para que puedas solucionarlo de forma proactiva.</text:p>
        </text:list-item>
      </text:list>
      <text:h text:style-name="P2" text:outline-level="2">16. Canal Directo de Soporte Técnico y Comunicación</text:h>
      <text:list text:style-name="L16">
        <text:list-item>
          <text:p text:style-name="P51"><text:span text:style-name="T1">Definición:</text:span> Ventana interactiva que permite al usuario reportar incidentes o resolver dudas directamente con el creador del software.</text:p>
        </text:list-item>
        <text:list-item>
          <text:p text:style-name="P52"><text:span text:style-name="T1">Acción Técnica:</text:span> Instalar un widget ligero de mensajería (como <text:span text:style-name="T1">Crisp o Intercom</text:span> en sus capas gratuitas) en la esquina de la aplicación. Esto canaliza la frustración de un usuario cuando encuentra un fallo (<text:span text:style-name="Emphasis"><text:span text:style-name="T2">bug</text:span></text:span>), dándote la oportunidad de retener al cliente antes de que abandone la aplicación y deje una mala calificación en las tiendas públicas.</text:p>
        </text:list-item>
      </text:list>
      <text:p text:style-name="P8"/>
      <text:p text:style-name="P8"/>
      <text:p text:style-name="P8"/>
      <text:h text:style-name="P1" text:outline-level="2"><text:soft-page-break/>🔒 <text:span text:style-name="T7">SECCIÓN 6: Estándares de Seguridad y Ciberdefensa (OWASP &amp; Pruebas)</text:span></text:h>
      <text:h text:style-name="P2" text:outline-level="2">17. Mitigación del OWASP Top 10 y Vulnerabilidades Web</text:h>
      <text:list text:style-name="L25">
        <text:list-item>
          <text:p text:style-name="P54"><text:span text:style-name="T1">Definición:</text:span> El <text:span text:style-name="Emphasis"><text:span text:style-name="T2">Open Worldwide Application Security Project</text:span></text:span> (OWASP) publica anualmente la lista de los 10 riesgos de seguridad más críticos en aplicaciones web a nivel global.</text:p>
        </text:list-item>
        <text:list-item>
          <text:p text:style-name="P20">Acción Técnica:</text:p>
          <text:list>
            <text:list-item>
              <text:p text:style-name="P54"><text:span text:style-name="T1">Inyección (SQL/NoSQL):</text:span> Prohibido concatenar texto directo en las consultas de base de datos. Utilizar siempre un ORM (como Prisma o Sequelize) o consultas parametrizadas.</text:p>
            </text:list-item>
            <text:list-item>
              <text:p text:style-name="P54"><text:span text:style-name="T1">Inyección de Prompts (IA):</text:span> Sanitizar los datos que ingresa el usuario antes de enviarlos a la API de Claude/OpenAI para evitar que altere las instrucciones base del sistema (<text:span text:style-name="Emphasis"><text:span text:style-name="T2">Prompt Injection</text:span></text:span>).</text:p>
            </text:list-item>
            <text:list-item>
              <text:p text:style-name="P55"><text:span text:style-name="T1">XSS (Cross-Site Scripting):</text:span> Sanitizar cualquier entrada de texto antes de renderizarla en el navegador para evitar la ejecución de scripts maliciosos.</text:p>
            </text:list-item>
          </text:list>
        </text:list-item>
      </text:list>
      <text:h text:style-name="P2" text:outline-level="2">18. Análisis de Seguridad Automatizado (SAST/DAST)</text:h>
      <text:list text:style-name="L26">
        <text:list-item>
          <text:p text:style-name="P56"><text:span text:style-name="T1">Definición:</text:span> Herramientas que escanean tu código y tus dependencias buscando vulnerabilidades conocidas o contraseñas expuestas por error.</text:p>
        </text:list-item>
        <text:list-item>
          <text:p text:style-name="P57"><text:span text:style-name="T1">Acción Técnica:</text:span> Configurar alertas como <text:span text:style-name="T1">GitHub Dependabot</text:span> o herramientas como <text:span text:style-name="T1">Snyk</text:span> en tu repositorio. Bloquearán el despliegue a producción si estás instalando una librería desactualizada que tenga un fallo de seguridad reportado internacionalmente.</text:p>
        </text:list-item>
      </text:list>
      <text:p text:style-name="Horizontal_20_Line"/>
      <text:h text:style-name="P1" text:outline-level="2">🎨 <text:span text:style-name="T7">SECCIÓN 7: Estándares de Diseño, Experiencia y Accesibilidad (UI/UX)</text:span></text:h>
      <text:h text:style-name="P2" text:outline-level="2">19. Diseño Consistente mediante Sistemas de Diseño (Design Systems)</text:h>
      <text:list text:style-name="L27">
        <text:list-item>
          <text:p text:style-name="P58"><text:span text:style-name="T1">Definición:</text:span> Uso de guías visuales estandarizadas para que la interfaz se sienta profesional, fluida y coherente en todas sus pantallas.</text:p>
        </text:list-item>
        <text:list-item>
          <text:p text:style-name="P59"><text:span text:style-name="T1">Acción Técnica:</text:span> Construir la interfaz utilizando frameworks de componentes probados (como <text:span text:style-name="T1">Tailwind UI, Shadcn/ui o Material UI</text:span>) combinados con tokens de diseño (colores, fuentes y espaciados fijos). Evitar el diseño libre o CSS improvisado pantalla por pantalla.</text:p>
        </text:list-item>
      </text:list>
      <text:h text:style-name="P2" text:outline-level="2">20. Accesibilidad Web (Estándares WCAG 2.1 / 2.2)</text:h>
      <text:list text:style-name="L28">
        <text:list-item>
          <text:p text:style-name="P62"><text:span text:style-name="T1">Definición:</text:span> Normativas internacionales (<text:span text:style-name="Emphasis"><text:span text:style-name="T2">Web Content Accessibility Guidelines</text:span></text:span>) que aseguran que tu aplicación pueda ser utilizada por personas con discapacidades visuales, motrices o cognitivas.</text:p>
        </text:list-item>
        <text:list-item>
          <text:p text:style-name="P21">Acción Técnica:</text:p>
          <text:list>
            <text:list-item>
              <text:p text:style-name="P61">Asegurar un contraste de color correcto entre el texto y el fondo (mínimo ratio 4.5:1).</text:p>
            </text:list-item>
            <text:list-item>
              <text:p text:style-name="P63"><text:soft-page-break/>Utilizar etiquetas HTML semánticas (<text:span text:style-name="Source_20_Text"><text:span text:style-name="T11">&lt;button&gt;</text:span></text:span>, <text:span text:style-name="Source_20_Text"><text:span text:style-name="T11">&lt;nav&gt;</text:span></text:span>, <text:span text:style-name="Source_20_Text"><text:span text:style-name="T11">&lt;main&gt;</text:span></text:span>) y atributos <text:span text:style-name="Source_20_Text"><text:span text:style-name="T11">aria-label</text:span></text:span> para que los lectores de pantalla puedan interpretar la app correctamente.</text:p>
            </text:list-item>
            <text:list-item>
              <text:p text:style-name="P60">Garantizar que toda la aplicación sea completamente navegable utilizando únicamente el teclado (tecla Tab).</text:p>
            </text:list-item>
          </text:list>
        </text:list-item>
      </text:list>
      <text:p text:style-name="Horizontal_20_Line"/>
      <text:h text:style-name="P1" text:outline-level="2">📜 <text:span text:style-name="T7">SECCIÓN 8: Estándares de Código, Arquitectura y Calidad de Software</text:span></text:h>
      <text:h text:style-name="P2" text:outline-level="2">21. Adherencia a Principios SOLID y Clean Code</text:h>
      <text:list text:style-name="L29">
        <text:list-item>
          <text:p text:style-name="P64"><text:span text:style-name="T1">Definición:</text:span> Reglas de diseño de código orientadas a que el software sea fácil de leer, mantener y extender en el futuro por otros programadores.</text:p>
        </text:list-item>
        <text:list-item>
          <text:p text:style-name="P22">Acción Técnica:</text:p>
          <text:list>
            <text:list-item>
              <text:p text:style-name="P64"><text:span text:style-name="T1">Principio de Responsabilidad Única:</text:span> Una función o archivo debe hacer una sola cosa bien. Si tu script de base de datos también está enviando correos y llamando a la IA, debes separarlo.</text:p>
            </text:list-item>
            <text:list-item>
              <text:p text:style-name="P65"><text:span text:style-name="T1">Código Autodocumentado:</text:span> Usar nombres de variables y funciones descriptivos (ej: <text:span text:style-name="Source_20_Text"><text:span text:style-name="T11">calcularMargenGananciaNeto()</text:span></text:span>) en lugar de abreviaciones confusas (ej: <text:span text:style-name="Source_20_Text"><text:span text:style-name="T11">calMarg()</text:span></text:span>).</text:p>
            </text:list-item>
          </text:list>
        </text:list-item>
      </text:list>
      <text:h text:style-name="P2" text:outline-level="2">22. Automatización de Estilo (Linters &amp; Formatters)</text:h>
      <text:list text:style-name="L30">
        <text:list-item>
          <text:p text:style-name="P66"><text:span text:style-name="T1">Definición:</text:span> Herramientas que fuerzan a que todo el código del proyecto tenga exactamente la misma estructura visual (comas, espacios, saltos de línea).</text:p>
        </text:list-item>
        <text:list-item>
          <text:p text:style-name="P67"><text:span text:style-name="T1">Acción Técnica:</text:span> Configurar <text:span text:style-name="T1">ESLint</text:span> y <text:span text:style-name="T1">Prettier</text:span> en tu entorno de desarrollo. Esto evita discusiones sobre cómo formatear el código y asegura que el código generado por la Inteligencia Artificial se adapte automáticamente al estándar estricto de tu proyecto.</text:p>
        </text:list-item>
      </text:list>
      <text:p text:style-name="Horizontal_20_Line"/>
      <text:h text:style-name="P1" text:outline-level="2">📈 <text:span text:style-name="T7">SECCIÓN 9: Estrategias de Escalabilidad Avanzada e Infraestructura</text:span></text:h>
      <text:h text:style-name="P2" text:outline-level="2">23. Arquitectura Basada en Microservicios o Servidores Desacoplados</text:h>
      <text:list text:style-name="L31">
        <text:list-item>
          <text:p text:style-name="P68"><text:span text:style-name="T1">Definición:</text:span> Separación de los componentes de la app para que un fallo en un área no bote todo el sistema.</text:p>
        </text:list-item>
        <text:list-item>
          <text:p text:style-name="P69"><text:span text:style-name="T1">Acción Técnica:</text:span> Si tu app tiene un scraper pesado (como el comparador de supermercados), ese scraper debe correr en un servidor independiente del backend principal. Si el scraper colapsa por memoria, la web donde los usuarios inician sesión y pagan seguirá funcionando perfectamente de forma aislada.</text:p>
        </text:list-item>
      </text:list>
      <text:h text:style-name="P2" text:outline-level="2"><text:soft-page-break/>24. Estrategia de Pruebas Automatizadas (Unit &amp; E2E Testing)</text:h>
      <text:list text:style-name="L32">
        <text:list-item>
          <text:p text:style-name="P70"><text:span text:style-name="T1">Definición:</text:span> Scripts escritos para probar tu propia aplicación automáticamente antes de lanzar actualizaciones.</text:p>
        </text:list-item>
        <text:list-item>
          <text:p text:style-name="P71"><text:span text:style-name="T1">Acción Técnica:</text:span> Implementar pruebas unitarias en funciones críticas (como la pasarela de pagos o el cálculo de intereses) utilizando herramientas como <text:span text:style-name="T1">Jest o Vitest</text:span>, y pruebas de extremo a extremo (E2E) con <text:span text:style-name="T1">Playwright</text:span>. Al subir código, estos bots simularán clics de usuarios para comprobar que el flujo de compra no se rompió.</text:p>
        </text:list-item>
      </text:list>
      <text:h text:style-name="P1" text:outline-level="2"><text:span text:style-name="T7"/></text:h>
      <text:h text:style-name="P1" text:outline-level="2">🚀 <text:span text:style-name="T7">SECCIÓN 10: Estrategias de Crecimiento Masivo (</text:span><text:span text:style-name="Emphasis"><text:span text:style-name="T8">Growth &amp; Virality</text:span></text:span><text:span text:style-name="T7">)</text:span></text:h>
      <text:h text:style-name="P1" text:outline-level="2"><text:span text:style-name="T7">25. Canales de Distribución Orgánica y Bucles de Viralidad (</text:span><text:span text:style-name="Emphasis"><text:span text:style-name="T8">Viral Loops</text:span></text:span><text:span text:style-name="T7">)</text:span></text:h>
      <text:list text:style-name="L33">
        <text:list-item>
          <text:p text:style-name="P72"><text:span text:style-name="T1">Definición:</text:span> Mecanismos diseñados dentro del producto para que cada nuevo usuario invite a más usuarios de forma matemática sin que tengas que pagar publicidad.</text:p>
        </text:list-item>
        <text:list-item>
          <text:p text:style-name="P23">Acción Técnica:</text:p>
          <text:list>
            <text:list-item>
              <text:p text:style-name="P72"><text:span text:style-name="T1">Compartir con valor:</text:span> En tu app de <text:span text:style-name="Emphasis"><text:span text:style-name="T2">Canasta Básica</text:span></text:span>, permite exportar el carrito optimizado como un PDF estético o un enlace web dinámico con la frase <text:span text:style-name="Emphasis"><text:span text:style-name="T2">"Optimizado con [Nombre de tu App]"</text:span></text:span>. Al enviarlo por WhatsApp al grupo familiar, cada miembro conocerá tu marca.</text:p>
            </text:list-item>
            <text:list-item>
              <text:p text:style-name="P73"><text:span text:style-name="T1">Sistemas de Referidos:</text:span> Ofrecer créditos para consultas de IA adicionales si un amigo se registra con su enlace de afiliado.</text:p>
            </text:list-item>
          </text:list>
        </text:list-item>
      </text:list>
      <text:h text:style-name="P1" text:outline-level="2"><text:span text:style-name="T7">26. Optimización en Tiendas y Motores de Búsqueda (</text:span><text:span text:style-name="Emphasis"><text:span text:style-name="T8">SEO &amp; ASO</text:span></text:span><text:span text:style-name="T7">)</text:span></text:h>
      <text:list text:style-name="L34">
        <text:list-item>
          <text:p text:style-name="P74"><text:span text:style-name="T1">Definición:</text:span> Técnicas para que tu herramienta web aparezca en los primeros lugares de Google (SEO) o tu app/juego destaque en la App Store y Google Play (ASO).</text:p>
        </text:list-item>
        <text:list-item>
          <text:p text:style-name="P24">Acción Técnica:</text:p>
          <text:list>
            <text:list-item>
              <text:p text:style-name="P74">Crear páginas de aterrizaje (<text:span text:style-name="Emphasis"><text:span text:style-name="T2">Landing Pages</text:span></text:span>) ultrarrápidas con palabras clave de alta intención de búsqueda (ej: <text:span text:style-name="Emphasis"><text:span text:style-name="T2">"Cómo hacer un currículum para pasar filtros de IA"</text:span></text:span>).</text:p>
            </text:list-item>
            <text:list-item>
              <text:p text:style-name="P75">Optimizar la carga inicial, el uso de etiquetas de metadatos (<text:span text:style-name="Source_20_Text"><text:span text:style-name="T11">meta tags</text:span></text:span>) abiertas para redes sociales (Open Graph) y mapas del sitio (<text:span text:style-name="Emphasis"><text:span text:style-name="T2">sitemaps</text:span></text:span>) automatizados.</text:p>
            </text:list-item>
          </text:list>
        </text:list-item>
      </text:list>
      <text:p text:style-name="Horizontal_20_Line"/>
      <text:h text:style-name="P1" text:outline-level="2">💰 <text:span text:style-name="T7">SECCIÓN 11: Ingeniería de Producto y Monetización Avanzada</text:span></text:h>
      <text:h text:style-name="P1" text:outline-level="2"><text:span text:style-name="T7">27. Métricas de Negocio en Tiempo Real (</text:span><text:span text:style-name="Emphasis"><text:span text:style-name="T8">Product Analytics</text:span></text:span><text:span text:style-name="T7">)</text:span></text:h>
      <text:list text:style-name="L35">
        <text:list-item>
          <text:p text:style-name="P76"><text:span text:style-name="T1">Definición:</text:span> Implementación de herramientas para medir exactamente qué hacen los usuarios dentro de tu aplicación, detectando dónde se aburren o por qué abandonan el proceso de pago.</text:p>
        </text:list-item>
        <text:list-item>
          <text:p text:style-name="P77"><text:span text:style-name="T1">Acción Técnica:</text:span> Integrar plataformas como <text:span text:style-name="T1">Mixpanel, PostHog o Amplitude</text:span>. Configurar eventos clave: cuándo abren la app, qué botón presionan más y en qué paso del formulario de compra cierran la ventana. <text:span text:style-name="T1">No puedes mejorar lo que no mides.</text:span></text:p>
        </text:list-item>
      </text:list>
      <text:h text:style-name="P2" text:outline-level="2"><text:soft-page-break/>28. Estrategias de Retención y Notificaciones Inteligentes</text:h>
      <text:list text:style-name="L36">
        <text:list-item>
          <text:p text:style-name="P78"><text:span text:style-name="T1">Definición:</text:span> Tácticas psicológicas y técnicas para evitar el <text:span text:style-name="Emphasis"><text:span text:style-name="T2">Churn</text:span></text:span> (tasa de usuarios que abandonan o cancelan tu servicio).</text:p>
        </text:list-item>
        <text:list-item>
          <text:p text:style-name="P25">Acción Técnica:</text:p>
          <text:list>
            <text:list-item>
              <text:p text:style-name="P78"><text:span text:style-name="T1">Notificaciones basadas en comportamiento:</text:span> Si tu app de <text:span text:style-name="Emphasis"><text:span text:style-name="T2">Rastreador de Garantías</text:span></text:span> detecta que un usuario subió una boleta pero no ha vuelto en 15 días, envíale una notificación push automatizada y personalizada, no un correo masivo de spam.</text:p>
            </text:list-item>
            <text:list-item>
              <text:p text:style-name="P79"><text:span text:style-name="T1">Experiencia de Bienvenida (</text:span><text:span text:style-name="Emphasis"><text:span text:style-name="T4">Onboarding</text:span></text:span><text:span text:style-name="T1">):</text:span> Los primeros 30 segundos del usuario dentro de la app deciden si la borrará o la conservará. Diseña flujos interactivos guiados que muestren el valor real del producto de inmediato (<text:span text:style-name="Emphasis"><text:span text:style-name="T2">Time-to-Value</text:span></text:span> mínimo).</text:p>
            </text:list-item>
          </text:list>
        </text:list-item>
      </text:list>
      <text:p text:style-name="Horizontal_20_Line"/>
      <text:h text:style-name="P1" text:outline-level="2">🎮 <text:span text:style-name="T7">SECCIÓN 12: Estándares Exclusivos para Videojuegos profesionales</text:span></text:h>
      <text:p text:style-name="P53">Si decides inclinarte por el desarrollo de juegos para hacerlos masivos y rentables, las reglas cambian drásticamente respecto a un software tradicional:</text:p>
      <text:h text:style-name="P1" text:outline-level="2"><text:span text:style-name="T7">29. Optimización de Rendimiento Extremo (</text:span><text:span text:style-name="Emphasis"><text:span text:style-name="T8">Game Performance</text:span></text:span><text:span text:style-name="T7">)</text:span></text:h>
      <text:list text:style-name="L37">
        <text:list-item>
          <text:p text:style-name="P80"><text:span text:style-name="T1">Definición:</text:span> Asegurar que el videojuego funcione de manera fluida (mínimo a 60 cuadros por segundo constantes) tanto en el último iPhone como en un teléfono de gama baja.</text:p>
        </text:list-item>
        <text:list-item>
          <text:p text:style-name="P26">Acción Técnica:</text:p>
          <text:list>
            <text:list-item>
              <text:p text:style-name="P80"><text:span text:style-name="T1">Uso de Object Pooling:</text:span> En lugar de crear y destruir objetos en memoria constantemente (como las balas en tu proyecto de <text:span text:style-name="Emphasis"><text:span text:style-name="T2">Refuerzo Escolar Gamificado</text:span></text:span>), reutiliza un grupo de objetos ocultos para no saturar el procesador (<text:span text:style-name="Emphasis"><text:span text:style-name="T2">Garbage Collector</text:span></text:span>).</text:p>
            </text:list-item>
            <text:list-item>
              <text:p text:style-name="P81"><text:span text:style-name="T1">Compresión de Texturas y Sprites:</text:span> Automatizar que los recursos visuales pesen lo mínimo posible mediante atlas de texturas para reducir el tamaño final de descarga del juego.</text:p>
            </text:list-item>
          </text:list>
        </text:list-item>
      </text:list>
      <text:h text:style-name="P2" text:outline-level="2">30. Lógica de Adicción Positiva y Economía Interna del Juego</text:h>
      <text:list text:style-name="L38">
        <text:list-item>
          <text:p text:style-name="P83"><text:span text:style-name="T1">Definición:</text:span> Diseño de niveles y mecánicas basadas en curvas de dificultad balanceadas y sistemas de recompensas que mantengan al jugador conectado a largo plazo.</text:p>
        </text:list-item>
        <text:list-item>
          <text:p text:style-name="P27">Acción Técnica:</text:p>
          <text:list>
            <text:list-item>
              <text:p text:style-name="P82">Estructurar de forma técnica la economía del juego (monedas de oro virtuales, gemas, pases de batalla) cuidando que no sufran de inflación o dejen el juego "roto".</text:p>
            </text:list-item>
            <text:list-item>
              <text:p text:style-name="P84">Integrar redes de anuncios mediadas (como <text:span text:style-name="T1">AppLovin MAX o Google AdMob</text:span>) que ofrezcan recompensas en video (<text:span text:style-name="Emphasis"><text:span text:style-name="T2">Rewarded Videos</text:span></text:span>) bien integradas en el bucle del juego, para monetizar usuarios que no quieren pagar con dinero real.</text:p>
            </text:list-item>
          </text:list>
        </text:list-item>
      </text:list>
      <text:p text:style-name="Horizontal_20_Line"/>
      <text:h text:style-name="P1" text:outline-level="2"><text:soft-page-break/>🏢 <text:span text:style-name="T7">SECCIÓN 13: El Enfoque "Vendible" (</text:span><text:span text:style-name="Emphasis"><text:span text:style-name="T8">Exit Readiness</text:span></text:span><text:span text:style-name="T7">)</text:span></text:h>
      <text:p text:style-name="P53">Si tu meta final es que una gran empresa de software o un fondo de inversión compre tu aplicación por una suma importante de dinero, debes prepararte desde el primer día:</text:p>
      <text:h text:style-name="P1" text:outline-level="2"><text:span text:style-name="T7">31. Documentación Técnica Rigurosa (</text:span><text:span text:style-name="Emphasis"><text:span text:style-name="T8">Architecture Blueprints</text:span></text:span><text:span text:style-name="T7">)</text:span></text:h>
      <text:list text:style-name="L39">
        <text:list-item>
          <text:p text:style-name="P85"><text:span text:style-name="T1">Definición:</text:span> Manual de instrucciones detallado de cómo está construida tu aplicación por dentro.</text:p>
        </text:list-item>
        <text:list-item>
          <text:p text:style-name="P86"><text:span text:style-name="T1">Acción Técnica:</text:span> Mantener un archivo <text:span text:style-name="Source_20_Text"><text:span text:style-name="T11">README.md</text:span></text:span> exhaustivo en tu GitHub y diagramas de arquitectura actualizados. Un inversionista querrá saber que si tú dejas el proyecto, cualquier otro ingeniero contratado podrá entender el código y continuar el desarrollo en menos de una semana.</text:p>
        </text:list-item>
      </text:list>
      <text:h text:style-name="P2" text:outline-level="2">32. Limpieza de Cuentas y Métricas de Cohortes</text:h>
      <text:list text:style-name="L40">
        <text:list-item>
          <text:p text:style-name="P87"><text:span text:style-name="T1">Definición:</text:span> Separación absoluta entre tus finanzas personales y el dinero que genera la aplicación.</text:p>
        </text:list-item>
        <text:list-item>
          <text:p text:style-name="P88"><text:span text:style-name="T1">Acción Técnica:</text:span> Todos los cobros de Stripe o pasarelas de pago deben caer en una cuenta bancaria exclusiva de la empresa asociada a la app. Registra métricas financieras clave de nivel internacional: <text:span text:style-name="T1">MRR</text:span> (Ingreso Mensual Recurrente), <text:span text:style-name="T1">LTV</text:span> (Valor del Tiempo de Vida del Cliente) y <text:span text:style-name="T1">CAC</text:span> (Costo de Adquisición de Clien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8T10:50:09.141552954</meta:creation-date>
    <dc:date>2026-07-18T12:22:35.670496605</dc:date>
    <meta:editing-duration>PT1H5M59S</meta:editing-duration>
    <meta:editing-cycles>1</meta:editing-cycles>
    <meta:document-statistic meta:table-count="0" meta:image-count="0" meta:object-count="0" meta:page-count="9" meta:paragraph-count="137" meta:word-count="2903" meta:character-count="18794" meta:non-whitespace-character-count="16116"/>
    <meta:generator>LibreOffice/24.2.7.2$Linux_X86_64 LibreOffice_project/420$Build-2</meta:generator>
  </office:meta>
</office:document-meta>
</file>